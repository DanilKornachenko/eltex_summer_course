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70000008ED84E26C5.png" manifest:media-type="image/png"/>
  <manifest:file-entry manifest:full-path="Pictures/10000001000002A4000002D7853A2808.png" manifest:media-type="image/png"/>
  <manifest:file-entry manifest:full-path="Pictures/10000001000003580000023919BF879B.png" manifest:media-type="image/png"/>
  <manifest:file-entry manifest:full-path="Pictures/100000010000036B000001B5093BF5B3.png" manifest:media-type="image/png"/>
  <manifest:file-entry manifest:full-path="Pictures/10000001000001D40000005A50160A41.png" manifest:media-type="image/png"/>
  <manifest:file-entry manifest:full-path="Pictures/10000001000002130000007C108E5CC7.png" manifest:media-type="image/png"/>
  <manifest:file-entry manifest:full-path="Pictures/100000010000017C00000031CB60BF47.png" manifest:media-type="image/png"/>
  <manifest:file-entry manifest:full-path="Pictures/100000010000021400000050B93C8ACD.png" manifest:media-type="image/png"/>
  <manifest:file-entry manifest:full-path="Pictures/10000001000002140000009115094379.png" manifest:media-type="image/png"/>
  <manifest:file-entry manifest:full-path="Pictures/1000000100000213000000B1D22F8D78.png" manifest:media-type="image/png"/>
  <manifest:file-entry manifest:full-path="Pictures/100000010000026B0000016C78E3D9CB.png" manifest:media-type="image/png"/>
  <manifest:file-entry manifest:full-path="Pictures/10000001000002190000021DEE368830.png" manifest:media-type="image/png"/>
  <manifest:file-entry manifest:full-path="Pictures/100000010000027F00000257D6A18A3F.png" manifest:media-type="image/png"/>
  <manifest:file-entry manifest:full-path="Pictures/10000001000001430000002822980153.png" manifest:media-type="image/png"/>
  <manifest:file-entry manifest:full-path="Pictures/10000001000003E7000000D40CA3790A.png" manifest:media-type="image/png"/>
  <manifest:file-entry manifest:full-path="Pictures/10000001000002360000003E4777EA88.png" manifest:media-type="image/png"/>
  <manifest:file-entry manifest:full-path="Pictures/10000001000002EF000000694FB7CED7.png" manifest:media-type="image/png"/>
  <manifest:file-entry manifest:full-path="Pictures/10000001000002E40000039B107F8215.png" manifest:media-type="image/png"/>
  <manifest:file-entry manifest:full-path="Pictures/10000001000002360000006654D1E52B.png" manifest:media-type="image/png"/>
  <manifest:file-entry manifest:full-path="Pictures/1000000100000338000000C171C80BE3.png" manifest:media-type="image/png"/>
  <manifest:file-entry manifest:full-path="Pictures/10000001000001C30000008AAE6D8071.png" manifest:media-type="image/png"/>
  <manifest:file-entry manifest:full-path="Pictures/10000001000003C000000337F98F8212.png" manifest:media-type="image/png"/>
  <manifest:file-entry manifest:full-path="Pictures/10000001000002D7000000DF006CC625.png" manifest:media-type="image/png"/>
  <manifest:file-entry manifest:full-path="Pictures/10000001000001E40000008FD5EC2F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8ed15" officeooo:paragraph-rsid="0018ed15"/>
    </style:style>
    <style:style style:name="P2" style:family="paragraph" style:parent-style-name="Standard">
      <style:text-properties officeooo:rsid="001a5292" officeooo:paragraph-rsid="001a5292"/>
    </style:style>
    <style:style style:name="P3" style:family="paragraph" style:parent-style-name="Standard">
      <style:text-properties officeooo:rsid="001bd089" officeooo:paragraph-rsid="001bd089"/>
    </style:style>
    <style:style style:name="P4" style:family="paragraph" style:parent-style-name="Standard">
      <style:text-properties officeooo:rsid="001cab0d" officeooo:paragraph-rsid="001cab0d"/>
    </style:style>
    <style:style style:name="P5" style:family="paragraph" style:parent-style-name="Standard">
      <style:text-properties officeooo:rsid="001dd5c1" officeooo:paragraph-rsid="001dd5c1"/>
    </style:style>
    <style:style style:name="P6" style:family="paragraph" style:parent-style-name="Standard">
      <style:text-properties officeooo:rsid="001f14ca" officeooo:paragraph-rsid="001f14ca"/>
    </style:style>
    <style:style style:name="P7" style:family="paragraph" style:parent-style-name="Standard">
      <style:text-properties officeooo:rsid="00200edf" officeooo:paragraph-rsid="00200edf"/>
    </style:style>
    <style:style style:name="P8" style:family="paragraph" style:parent-style-name="Standard">
      <style:text-properties officeooo:rsid="0022c686" officeooo:paragraph-rsid="0022c686"/>
    </style:style>
    <style:style style:name="P9" style:family="paragraph" style:parent-style-name="Standard">
      <style:text-properties officeooo:rsid="00243631" officeooo:paragraph-rsid="00243631"/>
    </style:style>
    <style:style style:name="P10" style:family="paragraph" style:parent-style-name="Standard">
      <style:text-properties officeooo:rsid="00247a0e" officeooo:paragraph-rsid="00247a0e"/>
    </style:style>
    <style:style style:name="P11" style:family="paragraph" style:parent-style-name="Standard">
      <style:text-properties officeooo:rsid="00251dd9" officeooo:paragraph-rsid="00251dd9"/>
    </style:style>
    <style:style style:name="P12" style:family="paragraph" style:parent-style-name="Standard">
      <style:text-properties officeooo:rsid="00259b28" officeooo:paragraph-rsid="00259b28"/>
    </style:style>
    <style:style style:name="P13" style:family="paragraph" style:parent-style-name="Standard">
      <style:text-properties officeooo:rsid="00272dc3" officeooo:paragraph-rsid="00272dc3"/>
    </style:style>
    <style:style style:name="T1" style:family="text">
      <style:text-properties officeooo:rsid="0022c686"/>
    </style:style>
    <style:style style:name="T2" style:family="text">
      <style:text-properties officeooo:rsid="00251d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рначенко Данил Александрович</text:p>
      <text:p text:style-name="P1"/>
      <text:p text:style-name="P1">День 3</text:p>
      <text:p text:style-name="P1"/>
      <text:p text:style-name="P1"><text:span text:style-name="T1">Раздел </text:span>1</text:p>
      <text:p text:style-name="P1"/>
      <text:p text:style-name="P1">1.</text:p>
      <text:p text:style-name="P1"><draw:frame draw:style-name="fr1" draw:name="Image1" text:anchor-type="char" svg:x="0.062cm" svg:y="0.058cm" svg:width="10.052cm" svg:height="1.296cm" draw:z-index="0"><draw:image xlink:href="Pictures/100000010000017C00000031CB60BF47.png" xlink:type="simple" xlink:show="embed" xlink:actuate="onLoad" draw:mime-type="image/png"/></draw:frame></text:p>
      <text:p text:style-name="P1"/>
      <text:p text:style-name="P1"/>
      <text:p text:style-name="P1">2.</text:p>
      <text:p text:style-name="P1"><draw:frame draw:style-name="fr1" draw:name="Image2" text:anchor-type="char" svg:x="0.102cm" svg:y="0.116cm" svg:width="16.374cm" svg:height="9.629cm" draw:z-index="1"><draw:image xlink:href="Pictures/100000010000026B0000016C78E3D9CB.png" xlink:type="simple" xlink:show="embed" xlink:actuate="onLoad" draw:mime-type="image/png"/></draw:frame></text:p>
      <text:p text:style-name="P1">3.</text:p>
      <text:p text:style-name="P1"><draw:frame draw:style-name="fr1" draw:name="Image3" text:anchor-type="char" svg:x="0cm" svg:y="0.196cm" svg:width="17cm" svg:height="3.605cm" draw:z-index="2"><draw:image xlink:href="Pictures/10000001000003E7000000D40CA3790A.png" xlink:type="simple" xlink:show="embed" xlink:actuate="onLoad" draw:mime-type="image/png"/></draw:frame></text:p>
      <text:p text:style-name="P2">4.</text:p>
      <text:p text:style-name="P2"><draw:frame draw:style-name="fr1" draw:name="Image4" text:anchor-type="char" svg:x="0.524cm" svg:y="0.143cm" svg:width="11.931cm" svg:height="3.649cm" draw:z-index="3"><draw:image xlink:href="Pictures/10000001000001C30000008AAE6D80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5.</text:p>
      <text:p text:style-name="P3"><draw:frame draw:style-name="fr1" draw:name="Image5" text:anchor-type="char" svg:x="0cm" svg:y="0.222cm" svg:width="17cm" svg:height="14.573cm" draw:z-index="4"><draw:image xlink:href="Pictures/10000001000003C000000337F98F8212.png" xlink:type="simple" xlink:show="embed" xlink:actuate="onLoad" draw:mime-type="image/png"/></draw:frame></text:p>
      <text:p text:style-name="P3"><draw:frame draw:style-name="fr1" draw:name="Image6" text:anchor-type="char" svg:x="0cm" svg:y="0.275cm" svg:width="17cm" svg:height="2.374cm" draw:z-index="5"><draw:image xlink:href="Pictures/10000001000002EF000000694FB7CED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7" text:anchor-type="char" svg:x="0.049cm" svg:y="0.196cm" svg:width="16.903cm" svg:height="15.847cm" draw:z-index="6"><draw:image xlink:href="Pictures/100000010000027F00000257D6A18A3F.png" xlink:type="simple" xlink:show="embed" xlink:actuate="onLoad" draw:mime-type="image/png"/></draw:frame></text:p>
      <text:p text:style-name="P4">6.</text:p>
      <text:p text:style-name="P4"><draw:frame draw:style-name="fr1" draw:name="Image8" text:anchor-type="char" svg:x="0.088cm" svg:y="0.275cm" svg:width="14.074cm" svg:height="2.117cm" draw:z-index="7"><draw:image xlink:href="Pictures/100000010000021400000050B93C8AC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7.</text:p>
      <text:p text:style-name="P5"><draw:frame draw:style-name="fr1" draw:name="Image9" text:anchor-type="char" svg:x="-0.044cm" svg:y="0.143cm" svg:width="14.074cm" svg:height="3.835cm" draw:z-index="8"><draw:image xlink:href="Pictures/1000000100000214000000911509437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8.</text:p>
      <text:p text:style-name="P5"><draw:frame draw:style-name="fr1" draw:name="Image10" text:anchor-type="char" svg:x="0.035cm" svg:y="0.09cm" svg:width="12.804cm" svg:height="3.784cm" draw:z-index="9"><draw:image xlink:href="Pictures/10000001000001E40000008FD5EC2FE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9.</text:p>
      <text:p text:style-name="P5"><draw:frame draw:style-name="fr1" draw:name="Image11" text:anchor-type="char" svg:x="0.088cm" svg:y="0.328cm" svg:width="14.974cm" svg:height="1.64cm" draw:z-index="10"><draw:image xlink:href="Pictures/10000001000002360000003E4777EA88.png" xlink:type="simple" xlink:show="embed" xlink:actuate="onLoad" draw:mime-type="image/png"/></draw:frame></text:p>
      <text:p text:style-name="P6">10.</text:p>
      <text:p text:style-name="P6"><draw:frame draw:style-name="fr1" draw:name="Image12" text:anchor-type="char" svg:x="0.168cm" svg:y="0.302cm" svg:width="14.974cm" svg:height="2.699cm" draw:z-index="11"><draw:image xlink:href="Pictures/10000001000002360000006654D1E52B.png" xlink:type="simple" xlink:show="embed" xlink:actuate="onLoad" draw:mime-type="image/png"/></draw:frame></text:p>
      <text:p text:style-name="P6">11.</text:p>
      <text:p text:style-name="P6"><draw:frame draw:style-name="fr1" draw:name="Image13" text:anchor-type="char" svg:x="0.233cm" svg:y="0.275cm" svg:width="14.048cm" svg:height="4.681cm" draw:z-index="12"><draw:image xlink:href="Pictures/1000000100000213000000B1D22F8D7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2.</text:p>
      <text:p text:style-name="P7"><draw:frame draw:style-name="fr1" draw:name="Image14" text:anchor-type="char" svg:x="0.471cm" svg:y="0.275cm" svg:width="14.048cm" svg:height="3.281cm" draw:z-index="13"><draw:image xlink:href="Pictures/10000001000002130000007C108E5CC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3.</text:p>
      <text:p text:style-name="P8"><draw:frame draw:style-name="fr1" draw:name="Image15" text:anchor-type="char" svg:x="-0.159cm" svg:y="0.312cm" svg:width="17cm" svg:height="3.981cm" draw:z-index="14"><draw:image xlink:href="Pictures/1000000100000338000000C171C80BE3.png" xlink:type="simple" xlink:show="embed" xlink:actuate="onLoad" draw:mime-type="image/png"/></draw:frame></text:p>
      <text:p text:style-name="P8">Раздел 2.</text:p>
      <text:p text:style-name="P8"/>
      <text:p text:style-name="P8">1,<text:span text:style-name="T2">2</text:span>.</text:p>
      <text:p text:style-name="P8"><draw:frame draw:style-name="fr1" draw:name="Image16" text:anchor-type="char" svg:x="0.75cm" svg:y="0.196cm" svg:width="12.381cm" svg:height="2.379cm" draw:z-index="15"><draw:image xlink:href="Pictures/10000001000001D40000005A50160A4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9"><draw:frame draw:style-name="fr1" draw:name="Image17" text:anchor-type="char" svg:x="0cm" svg:y="0.064cm" svg:width="17cm" svg:height="8.49cm" draw:z-index="16"><draw:image xlink:href="Pictures/100000010000036B000001B5093BF5B3.png" xlink:type="simple" xlink:show="embed" xlink:actuate="onLoad" draw:mime-type="image/png"/></draw:frame></text:p>
      <text:p text:style-name="P9"><text:soft-page-break/></text:p>
      <text:p text:style-name="P9"/>
      <text:p text:style-name="P9"/>
      <text:p text:style-name="P9"><draw:frame draw:style-name="fr2" draw:name="Image18" text:anchor-type="char" svg:width="17cm" svg:height="21.204cm" draw:z-index="17"><draw:image xlink:href="Pictures/10000001000002E40000039B107F821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2">3</text:span>.</text:p>
      <text:p text:style-name="P10"><draw:frame draw:style-name="fr1" draw:name="Image19" text:anchor-type="char" svg:x="0.291cm" svg:y="0.222cm" svg:width="17cm" svg:height="5.214cm" draw:z-index="18"><draw:image xlink:href="Pictures/10000001000002D7000000DF006CC625.png" xlink:type="simple" xlink:show="embed" xlink:actuate="onLoad" draw:mime-type="image/png"/></draw:frame></text:p>
      <text:p text:style-name="P11"><draw:frame draw:style-name="fr1" draw:name="Image20" text:anchor-type="char" svg:x="0.265cm" svg:y="0.169cm" svg:width="17cm" svg:height="11.299cm" draw:z-index="19"><draw:image xlink:href="Pictures/10000001000003580000023919BF879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4.</text:p>
      <text:p text:style-name="P11"><draw:frame draw:style-name="fr1" draw:name="Image21" text:anchor-type="char" svg:x="0.55cm" svg:y="0.312cm" svg:width="14.206cm" svg:height="14.312cm" draw:z-index="20"><draw:image xlink:href="Pictures/10000001000002190000021DEE36883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5.</text:p>
      <text:p text:style-name="P12"><draw:frame draw:style-name="fr1" draw:name="Image22" text:anchor-type="char" svg:x="0.497cm" svg:y="0.037cm" svg:width="8.544cm" svg:height="1.058cm" draw:z-index="21"><draw:image xlink:href="Pictures/10000001000001430000002822980153.png" xlink:type="simple" xlink:show="embed" xlink:actuate="onLoad" draw:mime-type="image/png"/></draw:frame>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6.</text:p>
      <text:p text:style-name="P13"><draw:frame draw:style-name="fr1" draw:name="Image23" text:anchor-type="char" svg:x="0cm" svg:y="0.249cm" svg:width="17cm" svg:height="18.283cm" draw:z-index="22"><draw:image xlink:href="Pictures/10000001000002A4000002D7853A2808.png" xlink:type="simple" xlink:show="embed" xlink:actuate="onLoad" draw:mime-type="image/png"/></draw:frame></text:p>
      <text:p text:style-name="P13"><draw:frame draw:style-name="fr2" draw:name="Image24" text:anchor-type="char" svg:width="17cm" svg:height="3.554cm" draw:z-index="23"><draw:image xlink:href="Pictures/10000001000002A70000008ED84E26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0T11:27:54.180154841</meta:creation-date>
    <dc:date>2026-07-12T07:15:46.789308306</dc:date>
    <meta:editing-duration>PT9M8S</meta:editing-duration>
    <meta:editing-cycles>2</meta:editing-cycles>
    <meta:generator>LibreOffice/26.2.4.2$Linux_X86_64 LibreOffice_project/620$Build-2</meta:generator>
    <meta:document-statistic meta:table-count="0" meta:image-count="24" meta:object-count="0" meta:page-count="9" meta:paragraph-count="22" meta:word-count="27" meta:character-count="95" meta:non-whitespace-character-count="90"/>
  </office:meta>
</office:document-meta>
</file>