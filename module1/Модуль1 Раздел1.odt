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700000091836DB540.png" manifest:media-type="image/png"/>
  <manifest:file-entry manifest:full-path="Pictures/1000000100000308000000A786BE817B.png" manifest:media-type="image/png"/>
  <manifest:file-entry manifest:full-path="Pictures/1000000100000219000000CDDFF48042.png" manifest:media-type="image/png"/>
  <manifest:file-entry manifest:full-path="Pictures/1000000100000219000000CD116D3D22.png" manifest:media-type="image/png"/>
  <manifest:file-entry manifest:full-path="Pictures/100000010000023A00000053F60721EA.png" manifest:media-type="image/png"/>
  <manifest:file-entry manifest:full-path="Pictures/100000010000023A000000296928FA5E.png" manifest:media-type="image/png"/>
  <manifest:file-entry manifest:full-path="Pictures/100000010000017F00000052CDC888AE.png" manifest:media-type="image/png"/>
  <manifest:file-entry manifest:full-path="Pictures/1000000100000242000000C840763655.png" manifest:media-type="image/png"/>
  <manifest:file-entry manifest:full-path="Pictures/10000001000003AE0000009219A8F6C0.png" manifest:media-type="image/png"/>
  <manifest:file-entry manifest:full-path="Pictures/10000001000003AE000001525004633F.png" manifest:media-type="image/png"/>
  <manifest:file-entry manifest:full-path="Pictures/10000001000003AE000001617F40B7B3.png" manifest:media-type="image/png"/>
  <manifest:file-entry manifest:full-path="Pictures/10000001000003AE000000927C7AD05A.png" manifest:media-type="image/png"/>
  <manifest:file-entry manifest:full-path="Pictures/10000001000003AE000000927A738DD9.png" manifest:media-type="image/png"/>
  <manifest:file-entry manifest:full-path="Pictures/10000001000002AF000000E7F0977E12.png" manifest:media-type="image/png"/>
  <manifest:file-entry manifest:full-path="Pictures/10000001000002AA000000694F8A6715.png" manifest:media-type="image/png"/>
  <manifest:file-entry manifest:full-path="Pictures/10000001000003080000006C68978183.png" manifest:media-type="image/png"/>
  <manifest:file-entry manifest:full-path="Pictures/10000001000003AE000001E7B1D1B002.png" manifest:media-type="image/png"/>
  <manifest:file-entry manifest:full-path="Pictures/10000001000002DB0000006D78986F6A.png" manifest:media-type="image/png"/>
  <manifest:file-entry manifest:full-path="Pictures/100000010000022500000108F1D459F5.png" manifest:media-type="image/png"/>
  <manifest:file-entry manifest:full-path="Pictures/10000001000002AA0000004008186086.png" manifest:media-type="image/png"/>
  <manifest:file-entry manifest:full-path="Pictures/10000001000001F800000067CA009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043a4" officeooo:paragraph-rsid="001043a4"/>
    </style:style>
    <style:style style:name="P2" style:family="paragraph" style:parent-style-name="Standard">
      <style:text-properties officeooo:rsid="00105dc3" officeooo:paragraph-rsid="00105dc3"/>
    </style:style>
    <style:style style:name="P3" style:family="paragraph" style:parent-style-name="Standard">
      <style:text-properties officeooo:rsid="0011a234" officeooo:paragraph-rsid="00105dc3"/>
    </style:style>
    <style:style style:name="P4" style:family="paragraph" style:parent-style-name="Standard">
      <style:text-properties officeooo:rsid="0011a234" officeooo:paragraph-rsid="0011a234"/>
    </style:style>
    <style:style style:name="P5" style:family="paragraph" style:parent-style-name="Standard">
      <style:text-properties officeooo:rsid="001352e1" officeooo:paragraph-rsid="001352e1"/>
    </style:style>
    <style:style style:name="P6" style:family="paragraph" style:parent-style-name="Standard">
      <style:text-properties officeooo:rsid="0013b727" officeooo:paragraph-rsid="0013b727"/>
    </style:style>
    <style:style style:name="P7" style:family="paragraph" style:parent-style-name="Standard">
      <style:text-properties officeooo:rsid="0014fc83" officeooo:paragraph-rsid="0014fc83"/>
    </style:style>
    <style:style style:name="P8" style:family="paragraph" style:parent-style-name="Standard">
      <style:text-properties officeooo:rsid="00160928" officeooo:paragraph-rsid="00160928"/>
    </style:style>
    <style:style style:name="P9" style:family="paragraph" style:parent-style-name="Standard">
      <style:text-properties officeooo:rsid="0016a1ad" officeooo:paragraph-rsid="0016a1ad"/>
    </style:style>
    <style:style style:name="P10" style:family="paragraph" style:parent-style-name="Standard">
      <style:text-properties officeooo:rsid="0016b7bd" officeooo:paragraph-rsid="0016b7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рначенко Данил<text:line-break/><text:line-break/>Раздел 1</text:p>
      <text:p text:style-name="P1"/>
      <text:p text:style-name="P1">1.</text:p>
      <text:p text:style-name="P1">ssh eltex-v22@217.71.138.1 -p 44556</text:p>
      <text:p text:style-name="P1"><draw:frame draw:style-name="fr1" draw:name="Image6" text:anchor-type="char" svg:width="17cm" svg:height="5.717cm" draw:z-index="5"><draw:image xlink:href="Pictures/10000001000002AF000000E7F0977E12.png" xlink:type="simple" xlink:show="embed" xlink:actuate="onLoad" draw:mime-type="image/png"/></draw:frame></text:p>
      <text:p text:style-name="P1">2.</text:p>
      <text:p text:style-name="P1">screen -ls</text:p>
      <text:p text:style-name="P1"><draw:frame draw:style-name="fr2" draw:name="Image7" text:anchor-type="char" svg:x="1.979cm" svg:y="0.153cm" svg:width="10.132cm" svg:height="2.17cm" draw:z-index="6"><draw:image xlink:href="Pictures/100000010000017F00000052CDC888A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3.</text:p>
      <text:p text:style-name="P1">screen -S top -d -m top</text:p>
      <text:p text:style-name="P1">4.</text:p>
      <text:p text:style-name="P1">screen -ls</text:p>
      <text:p text:style-name="P1"><draw:frame draw:style-name="fr3" draw:name="Image8" text:anchor-type="char" svg:width="15.291cm" svg:height="5.292cm" draw:z-index="7"><draw:image xlink:href="Pictures/1000000100000242000000C840763655.png" xlink:type="simple" xlink:show="embed" xlink:actuate="onLoad" draw:mime-type="image/png"/></draw:frame></text:p>
      <text:p text:style-name="P1">5.</text:p>
      <text:p text:style-name="P1">screen -r top</text:p>
      <text:p text:style-name="P1"><draw:frame draw:style-name="fr1" draw:name="Image9" text:anchor-type="char" svg:width="17cm" svg:height="6.369cm" draw:z-index="8"><draw:image xlink:href="Pictures/10000001000003AE000001617F40B7B3.png" xlink:type="simple" xlink:show="embed" xlink:actuate="onLoad" draw:mime-type="image/png"/></draw:frame><text:soft-page-break/></text:p>
      <text:p text:style-name="P1">6.</text:p>
      <text:p text:style-name="P1">ctrl+a c</text:p>
      <text:p text:style-name="P1">7.</text:p>
      <text:p text:style-name="P1">watch /usr/bin/vmstat</text:p>
      <text:p text:style-name="P1"><draw:frame draw:style-name="fr1" draw:name="Image1" text:anchor-type="char" svg:width="17cm" svg:height="2.633cm" draw:z-index="0"><draw:image xlink:href="Pictures/10000001000003AE0000009219A8F6C0.png" xlink:type="simple" xlink:show="embed" xlink:actuate="onLoad" draw:mime-type="image/png"/></draw:frame>8.</text:p>
      <text:p text:style-name="P1">ctrl+a «</text:p>
      <text:p text:style-name="P1"><draw:frame draw:style-name="fr1" draw:name="Image2" text:anchor-type="char" svg:width="17cm" svg:height="2.633cm" draw:z-index="1"><draw:image xlink:href="Pictures/10000001000003AE000000927C7AD05A.png" xlink:type="simple" xlink:show="embed" xlink:actuate="onLoad" draw:mime-type="image/png"/></draw:frame>9.</text:p>
      <text:p text:style-name="P1">ctrl+a shift+a</text:p>
      <text:p text:style-name="P1"><draw:frame draw:style-name="fr4" draw:name="Image3" text:anchor-type="char" svg:width="17cm" svg:height="2.633cm" draw:z-index="2"><draw:image xlink:href="Pictures/10000001000003AE000000927A738DD9.png" xlink:type="simple" xlink:show="embed" xlink:actuate="onLoad" draw:mime-type="image/png"/></draw:frame>10.</text:p>
      <text:p text:style-name="P1">ctrl+a d</text:p>
      <text:p text:style-name="P2">11.</text:p>
      <text:p text:style-name="P2"/>
      <text:p text:style-name="P2"><draw:frame draw:style-name="fr4" draw:name="Image4" text:anchor-type="char" svg:width="17cm" svg:height="8.788cm" draw:z-index="3"><draw:image xlink:href="Pictures/10000001000003AE000001E7B1D1B002.png" xlink:type="simple" xlink:show="embed" xlink:actuate="onLoad" draw:mime-type="image/png"/></draw:frame><text:soft-page-break/>12.</text:p>
      <text:p text:style-name="P3"><draw:frame draw:style-name="fr2" draw:name="Image5" text:anchor-type="char" svg:x="-0.159cm" svg:y="0.116cm" svg:width="17cm" svg:height="6.1cm" draw:z-index="4"><draw:image xlink:href="Pictures/10000001000003AE000001525004633F.png" xlink:type="simple" xlink:show="embed" xlink:actuate="onLoad" draw:mime-type="image/png"/></draw:frame></text:p>
      <text:p text:style-name="P4">Раздел 2</text:p>
      <text:p text:style-name="P4"/>
      <text:p text:style-name="P5">1.</text:p>
      <text:p text:style-name="P5"><draw:frame draw:style-name="fr2" draw:name="Image10" text:anchor-type="char" svg:x="0cm" svg:y="0.222cm" svg:width="17cm" svg:height="2.533cm" draw:z-index="9"><draw:image xlink:href="Pictures/10000001000002DB0000006D78986F6A.png" xlink:type="simple" xlink:show="embed" xlink:actuate="onLoad" draw:mime-type="image/png"/></draw:frame></text:p>
      <text:p text:style-name="P5">2.</text:p>
      <text:p text:style-name="P5"><draw:frame draw:style-name="fr2" draw:name="Image11" text:anchor-type="char" svg:x="0cm" svg:y="0.143cm" svg:width="17cm" svg:height="2.616cm" draw:z-index="10"><draw:image xlink:href="Pictures/10000001000002AA000000694F8A6715.png" xlink:type="simple" xlink:show="embed" xlink:actuate="onLoad" draw:mime-type="image/png"/></draw:frame></text:p>
      <text:p text:style-name="P5"/>
      <text:p text:style-name="P5"/>
      <text:p text:style-name="P5"><text:soft-page-break/>3.</text:p>
      <text:p text:style-name="P5"/>
      <text:p text:style-name="P5"><draw:frame draw:style-name="fr2" draw:name="Image12" text:anchor-type="char" svg:x="0cm" svg:y="0.116cm" svg:width="17cm" svg:height="1.595cm" draw:z-index="11"><draw:image xlink:href="Pictures/10000001000002AA0000004008186086.png" xlink:type="simple" xlink:show="embed" xlink:actuate="onLoad" draw:mime-type="image/png"/></draw:frame></text:p>
      <text:p text:style-name="P5">4. Ответ: 2000</text:p>
      <text:p text:style-name="P5"><draw:frame draw:style-name="fr2" draw:name="Image13" text:anchor-type="char" svg:x="0.141cm" svg:y="0.233cm" svg:width="13.333cm" svg:height="2.723cm" draw:z-index="12"><draw:image xlink:href="Pictures/10000001000001F800000067CA00976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5. </text:p>
      <text:p text:style-name="P6"><draw:frame draw:style-name="fr2" draw:name="Image14" text:anchor-type="char" svg:x="0.18cm" svg:y="0.143cm" svg:width="14.524cm" svg:height="6.983cm" draw:z-index="13"><draw:image xlink:href="Pictures/100000010000022500000108F1D459F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6.</text:p>
      <text:p text:style-name="P7"><draw:frame draw:style-name="fr2" draw:name="Image15" text:anchor-type="char" svg:x="0.432cm" svg:y="0.249cm" svg:width="15.079cm" svg:height="1.085cm" draw:z-index="14"><draw:image xlink:href="Pictures/100000010000023A000000296928FA5E.png" xlink:type="simple" xlink:show="embed" xlink:actuate="onLoad" draw:mime-type="image/png"/></draw:frame></text:p>
      <text:p text:style-name="P8">7.</text:p>
      <text:p text:style-name="P8"><draw:frame draw:style-name="fr2" draw:name="Image16" text:anchor-type="char" svg:x="0.459cm" svg:y="0.143cm" svg:width="15.079cm" svg:height="2.194cm" draw:z-index="15"><draw:image xlink:href="Pictures/100000010000023A00000053F60721E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10,11,12</text:p>
      <text:p text:style-name="P9"><draw:frame draw:style-name="fr2" draw:name="Image17" text:anchor-type="char" svg:x="0.894cm" svg:y="0.196cm" svg:width="14.206cm" svg:height="5.422cm" draw:z-index="16"><draw:image xlink:href="Pictures/1000000100000219000000CDDFF48042.png" xlink:type="simple" xlink:show="embed" xlink:actuate="onLoad" draw:mime-type="image/png"/></draw:frame></text:p>
      <text:p text:style-name="P9">13.</text:p>
      <text:p text:style-name="P9"><draw:frame draw:style-name="fr2" draw:name="Image18" text:anchor-type="char" svg:x="0.55cm" svg:y="0.206cm" svg:width="14.206cm" svg:height="5.422cm" draw:z-index="17"><draw:image xlink:href="Pictures/1000000100000219000000CD116D3D2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14.</text:p>
      <text:p text:style-name="P10"><draw:frame draw:style-name="fr2" draw:name="Image19" text:anchor-type="char" svg:x="-0.238cm" svg:y="0.233cm" svg:width="17cm" svg:height="2.365cm" draw:z-index="18"><draw:image xlink:href="Pictures/10000001000003080000006C68978183.png" xlink:type="simple" xlink:show="embed" xlink:actuate="onLoad" draw:mime-type="image/png"/></draw:frame></text:p>
      <text:p text:style-name="P10">15. В .bashrc</text:p>
      <text:p text:style-name="P10"><draw:frame draw:style-name="fr2" draw:name="Image20" text:anchor-type="char" svg:x="-0.37cm" svg:y="0.392cm" svg:width="17cm" svg:height="3.657cm" draw:z-index="19"><draw:image xlink:href="Pictures/1000000100000308000000A786BE817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16.</text:p>
      <text:p text:style-name="P10"><draw:frame draw:style-name="fr2" draw:name="Image21" text:anchor-type="char" svg:x="-0.132cm" svg:y="0.233cm" svg:width="17cm" svg:height="3.628cm" draw:z-index="20"><draw:image xlink:href="Pictures/10000001000002A700000091836DB540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12:38:24.372027221</meta:creation-date>
    <dc:date>2026-07-06T21:13:33.719929476</dc:date>
    <meta:editing-duration>PT10M22S</meta:editing-duration>
    <meta:editing-cycles>3</meta:editing-cycles>
    <meta:generator>LibreOffice/26.2.4.2$Linux_X86_64 LibreOffice_project/620$Build-2</meta:generator>
    <meta:document-statistic meta:table-count="0" meta:image-count="21" meta:object-count="0" meta:page-count="6" meta:paragraph-count="36" meta:word-count="61" meta:character-count="268" meta:non-whitespace-character-count="241"/>
  </office:meta>
</office:document-meta>
</file>